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fo:background-color="#333333"/>
    </style:style>
    <style:style style:name="ce4" style:family="table-cell" style:parent-style-name="Default" style:data-style-name="N11">
      <style:table-cell-properties fo:background-color="#333333"/>
    </style:style>
    <style:style style:name="ce5" style:family="table-cell" style:parent-style-name="Default" style:data-style-name="N107"/>
    <style:style style:name="ce6" style:family="table-cell" style:parent-style-name="Default" style:data-style-name="N2">
      <style:table-cell-properties fo:background-color="#4b1f6f"/>
    </style:style>
    <style:style style:name="ce7" style:family="table-cell" style:parent-style-name="Default" style:data-style-name="N108">
      <style:table-cell-properties fo:background-color="#4b1f6f"/>
      <style:text-properties fo:font-weight="bold" style:font-weight-asian="bold" style:font-weight-complex="bold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ce1" office:value-type="string" calcext:value-type="string">
            <text:p>K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Sigma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up</text:p>
          </table:table-cell>
          <table:table-cell table:style-name="ce3" table:formula="of:=EXP([.C2]*SQRT([.C3]))" office:value-type="float" office:value="1.09951407236227" calcext:value-type="float">
            <text:p>1,09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down</text:p>
          </table:table-cell>
          <table:table-cell table:style-name="ce3" table:formula="of:=1/[.C4]" office:value-type="float" office:value="0.909492679663058" calcext:value-type="float">
            <text:p>0,90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/>
          <table:table-cell table:number-columns-repeated="5" table:style-name="ce4" office:value-type="percentage" office:value="0.08" calcext:value-type="percentage">
            <text:p>8,00 %</text:p>
          </table:table-cell>
        </table:table-row>
        <table:table-row table:style-name="ro1">
          <table:table-cell/>
          <table:table-cell table:style-name="ce1" office:value-type="string" calcext:value-type="string">
            <text:p>r fwd</text:p>
          </table:table-cell>
          <table:table-cell table:style-name="ce4"/>
          <table:table-cell table:style-name="ce4" table:formula="of:=[.D9]" office:value-type="percentage" office:value="0.08" calcext:value-type="percentage">
            <text:p>8,00 %</text:p>
          </table:table-cell>
          <table:table-cell table:style-name="ce4" table:formula="of:=LN(EXP([.E8]*[.E9])/EXP([.D8]*[.D9]))/[.$C$3]" office:value-type="percentage" office:value="0.0800000000000005" calcext:value-type="percentage">
            <text:p>8,00 %</text:p>
          </table:table-cell>
          <table:table-cell table:style-name="ce4" table:formula="of:=LN(EXP([.F8]*[.F9])/EXP([.E8]*[.E9]))/[.$C$3]" office:value-type="percentage" office:value="0.0799999999999983" calcext:value-type="percentage">
            <text:p>8,00 %</text:p>
          </table:table-cell>
          <table:table-cell table:style-name="ce4" table:formula="of:=LN(EXP([.G8]*[.G9])/EXP([.F8]*[.F9]))/[.$C$3]" office:value-type="percentage" office:value="0.0799999999999983" calcext:value-type="percentage">
            <text:p>8,00 %</text:p>
          </table:table-cell>
          <table:table-cell table:style-name="ce4" table:formula="of:=LN(EXP([.H8]*[.H9])/EXP([.G8]*[.G9]))/[.$C$3]" office:value-type="percentage" office:value="0.0800000000000005" calcext:value-type="percentage">
            <text:p>8,00 %</text:p>
          </table:table-cell>
        </table:table-row>
        <table:table-row table:style-name="ro1">
          <table:table-cell/>
          <table:table-cell table:style-name="ce1" office:value-type="string" calcext:value-type="string">
            <text:p>p</text:p>
          </table:table-cell>
          <table:table-cell table:style-name="ce3"/>
          <table:table-cell table:style-name="ce3" table:formula="of:=(EXP([.D10]*[.$C$3])-[.$C$5])/([.$C$4]-[.$C$5])" office:value-type="float" office:value="0.518570064356893" calcext:value-type="float">
            <text:p>0,5186</text:p>
          </table:table-cell>
          <table:table-cell table:style-name="ce3" table:formula="of:=(EXP([.E10]*[.$C$3])-[.$C$5])/([.$C$4]-[.$C$5])" office:value-type="float" office:value="0.518570064356893" calcext:value-type="float">
            <text:p>0,5186</text:p>
          </table:table-cell>
          <table:table-cell table:style-name="ce3" table:formula="of:=(EXP([.F10]*[.$C$3])-[.$C$5])/([.$C$4]-[.$C$5])" office:value-type="float" office:value="0.518570064356892" calcext:value-type="float">
            <text:p>0,5186</text:p>
          </table:table-cell>
          <table:table-cell table:style-name="ce3" table:formula="of:=(EXP([.G10]*[.$C$3])-[.$C$5])/([.$C$4]-[.$C$5])" office:value-type="float" office:value="0.518570064356892" calcext:value-type="float">
            <text:p>0,5186</text:p>
          </table:table-cell>
          <table:table-cell table:style-name="ce3" table:formula="of:=(EXP([.H10]*[.$C$3])-[.$C$5])/([.$C$4]-[.$C$5])" office:value-type="float" office:value="0.518570064356893" calcext:value-type="float">
            <text:p>0,5186</text:p>
          </table:table-cell>
        </table:table-row>
        <table:table-row table:style-name="ro1"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6" office:value-type="float" office:value="100" calcext:value-type="float">
            <text:p>100,00</text:p>
          </table:table-cell>
          <table:table-cell table:style-name="ce6" table:formula="of:=[.C13]*[.C4]" office:value-type="float" office:value="109.951407236227" calcext:value-type="float">
            <text:p>109,95</text:p>
          </table:table-cell>
          <table:table-cell table:style-name="ce6" table:formula="of:=[.D13]*[.$C$4]" office:value-type="float" office:value="120.893119532266" calcext:value-type="float">
            <text:p>120,89</text:p>
          </table:table-cell>
          <table:table-cell table:style-name="ce6" table:formula="of:=[.E13]*[.$C$4]" office:value-type="float" office:value="132.9236861775" calcext:value-type="float">
            <text:p>132,92</text:p>
          </table:table-cell>
          <table:table-cell table:formula="of:=[.F13]*[.$C$4]" office:value-type="float" office:value="146.151463502427" calcext:value-type="float">
            <text:p>146,15</text:p>
          </table:table-cell>
          <table:table-cell table:formula="of:=[.G13]*[.$C$4]" office:value-type="float" office:value="160.695590817259" calcext:value-type="float">
            <text:p>160,70</text:p>
          </table:table-cell>
        </table:table-row>
        <table:table-row table:style-name="ro1">
          <table:table-cell table:number-columns-repeated="3"/>
          <table:table-cell table:style-name="ce6" table:formula="of:=[.C13]*[.$C$5]" office:value-type="float" office:value="90.9492679663057" calcext:value-type="float">
            <text:p>90,95</text:p>
          </table:table-cell>
          <table:table-cell table:style-name="ce6" table:formula="of:=[.D14]*[.$C$4]" office:value-type="float" office:value="100" calcext:value-type="float">
            <text:p>100,00</text:p>
          </table:table-cell>
          <table:table-cell table:style-name="ce6" table:formula="of:=[.E14]*[.$C$4]" office:value-type="float" office:value="109.951407236227" calcext:value-type="float">
            <text:p>109,95</text:p>
          </table:table-cell>
          <table:table-cell table:formula="of:=[.F14]*[.$C$4]" office:value-type="float" office:value="120.893119532266" calcext:value-type="float">
            <text:p>120,89</text:p>
          </table:table-cell>
          <table:table-cell table:formula="of:=[.G14]*[.$C$4]" office:value-type="float" office:value="132.9236861775" calcext:value-type="float">
            <text:p>132,92</text:p>
          </table:table-cell>
        </table:table-row>
        <table:table-row table:style-name="ro1">
          <table:table-cell table:number-columns-repeated="4"/>
          <table:table-cell table:style-name="ce6" table:formula="of:=[.D14]*[.$C$5]" office:value-type="float" office:value="82.7176934360689" calcext:value-type="float">
            <text:p>82,72</text:p>
          </table:table-cell>
          <table:table-cell table:style-name="ce6" table:formula="of:=[.E15]*[.$C$4]" office:value-type="float" office:value="90.9492679663058" calcext:value-type="float">
            <text:p>90,95</text:p>
          </table:table-cell>
          <table:table-cell table:formula="of:=[.F15]*[.$C$4]" office:value-type="float" office:value="100" calcext:value-type="float">
            <text:p>100,00</text:p>
          </table:table-cell>
          <table:table-cell table:formula="of:=[.G15]*[.$C$4]" office:value-type="float" office:value="109.951407236227" calcext:value-type="float">
            <text:p>109,95</text:p>
          </table:table-cell>
        </table:table-row>
        <table:table-row table:style-name="ro1">
          <table:table-cell table:number-columns-repeated="5"/>
          <table:table-cell table:style-name="ce6" table:formula="of:=[.E15]*[.$C$5]" office:value-type="float" office:value="75.2311366587176" calcext:value-type="float">
            <text:p>75,23</text:p>
          </table:table-cell>
          <table:table-cell table:formula="of:=[.F16]*[.$C$4]" office:value-type="float" office:value="82.7176934360689" calcext:value-type="float">
            <text:p>82,72</text:p>
          </table:table-cell>
          <table:table-cell table:formula="of:=[.G16]*[.$C$4]" office:value-type="float" office:value="90.9492679663058" calcext:value-type="float">
            <text:p>90,95</text:p>
          </table:table-cell>
        </table:table-row>
        <table:table-row table:style-name="ro1">
          <table:table-cell table:number-columns-repeated="6"/>
          <table:table-cell table:formula="of:=[.F16]*[.$C$5]" office:value-type="float" office:value="68.4221680738347" calcext:value-type="float">
            <text:p>68,42</text:p>
          </table:table-cell>
          <table:table-cell table:formula="of:=[.G17]*[.$C$4]" office:value-type="float" office:value="75.2311366587176" calcext:value-type="float">
            <text:p>75,23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[.G17]*[.$C$5]" office:value-type="float" office:value="62.2294609898281" calcext:value-type="float">
            <text:p>62,23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Put</text:p>
          </table:table-cell>
          <table:table-cell table:style-name="ce7" table:formula="of:=MAX([.$C$1]-[.C13];EXP(-[.D$10]*[.$C$3])*([.D$11]*[.D22]+(1-[.D$11])*[.D23]))" office:value-type="float" office:value="4.91921106455028" calcext:value-type="float">
            <text:p>4,919211064550</text:p>
          </table:table-cell>
          <table:table-cell table:style-name="ce6" table:formula="of:=MAX([.$C$1]-[.D13];EXP(-[.E$10]*[.$C$3])*([.E$11]*[.E22]+(1-[.E$11])*[.E23]))" office:value-type="float" office:value="2.01902666247309" calcext:value-type="float">
            <text:p>2,02</text:p>
          </table:table-cell>
          <table:table-cell table:style-name="ce6" table:formula="of:=MAX([.$C$1]-[.E13];EXP(-[.F$10]*[.$C$3])*([.F$11]*[.F22]+(1-[.F$11])*[.F23]))" office:value-type="float" office:value="0.441275404171183" calcext:value-type="float">
            <text:p>0,44</text:p>
          </table:table-cell>
          <table:table-cell table:style-name="ce6" table:formula="of:=MAX([.$C$1]-[.F13];EXP(-[.G$10]*[.$C$3])*([.G$11]*[.G22]+(1-[.G$11])*[.G23]))" office:value-type="float" office:value="0" calcext:value-type="float">
            <text:p>0,00</text:p>
          </table:table-cell>
          <table:table-cell table:formula="of:=MAX([.$C$1]-[.G13];EXP(-[.H$10]*[.$C$3])*([.H$11]*[.H22]+(1-[.H$11])*[.H23]))" office:value-type="float" office:value="0" calcext:value-type="float">
            <text:p>0,00</text:p>
          </table:table-cell>
          <table:table-cell table:formula="of:=MAX([.$C$1]-[.H13];0)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" table:formula="of:=MAX([.$C$1]-[.D14];EXP(-[.E$10]*[.$C$3])*([.E$11]*[.E23]+(1-[.E$11])*[.E24]))" office:value-type="float" office:value="8.12520267754432" calcext:value-type="float">
            <text:p>8,13</text:p>
          </table:table-cell>
          <table:table-cell table:style-name="ce6" table:formula="of:=MAX([.$C$1]-[.E14];EXP(-[.F$10]*[.$C$3])*([.F$11]*[.F23]+(1-[.F$11])*[.F24]))" office:value-type="float" office:value="3.75217930747962" calcext:value-type="float">
            <text:p>3,75</text:p>
          </table:table-cell>
          <table:table-cell table:style-name="ce6" table:formula="of:=MAX([.$C$1]-[.F14];EXP(-[.G$10]*[.$C$3])*([.G$11]*[.G23]+(1-[.G$11])*[.G24]))" office:value-type="float" office:value="0.923955352618891" calcext:value-type="float">
            <text:p>0,92</text:p>
          </table:table-cell>
          <table:table-cell table:formula="of:=MAX([.$C$1]-[.G14];EXP(-[.H$10]*[.$C$3])*([.H$11]*[.H23]+(1-[.H$11])*[.H24]))" office:value-type="float" office:value="0" calcext:value-type="float">
            <text:p>0,00</text:p>
          </table:table-cell>
          <table:table-cell table:formula="of:=MAX([.$C$1]-[.H14];0)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" table:formula="of:=MAX([.$C$1]-[.E15];EXP(-[.F$10]*[.$C$3])*([.F$11]*[.F24]+(1-[.F$11])*[.F25]))" office:value-type="float" office:value="12.9711442369901" calcext:value-type="float">
            <text:p>12,97</text:p>
          </table:table-cell>
          <table:table-cell table:style-name="ce6" table:formula="of:=MAX([.$C$1]-[.F15];EXP(-[.G$10]*[.$C$3])*([.G$11]*[.G24]+(1-[.G$11])*[.G25]))" office:value-type="float" office:value="6.86118851629304" calcext:value-type="float">
            <text:p>6,86</text:p>
          </table:table-cell>
          <table:table-cell table:formula="of:=MAX([.$C$1]-[.G15];EXP(-[.H$10]*[.$C$3])*([.H$11]*[.H24]+(1-[.H$11])*[.H25]))" office:value-type="float" office:value="1.93460475150781" calcext:value-type="float">
            <text:p>1,93</text:p>
          </table:table-cell>
          <table:table-cell table:formula="of:=MAX([.$C$1]-[.H15];0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6" table:formula="of:=MAX([.$C$1]-[.F16];EXP(-[.G$10]*[.$C$3])*([.G$11]*[.G25]+(1-[.G$11])*[.G26]))" office:value-type="float" office:value="19.7688633412824" calcext:value-type="float">
            <text:p>19,77</text:p>
          </table:table-cell>
          <table:table-cell table:formula="of:=MAX([.$C$1]-[.G16];EXP(-[.H$10]*[.$C$3])*([.H$11]*[.H25]+(1-[.H$11])*[.H26]))" office:value-type="float" office:value="12.2823065639311" calcext:value-type="float">
            <text:p>12,28</text:p>
          </table:table-cell>
          <table:table-cell table:formula="of:=MAX([.$C$1]-[.H16];0)" office:value-type="float" office:value="4.05073203369425" calcext:value-type="float">
            <text:p>4,05</text:p>
          </table:table-cell>
        </table:table-row>
        <table:table-row table:style-name="ro1">
          <table:table-cell table:number-columns-repeated="6"/>
          <table:table-cell table:formula="of:=MAX([.$C$1]-[.G17];EXP(-[.H$10]*[.$C$3])*([.H$11]*[.H26]+(1-[.H$11])*[.H27]))" office:value-type="float" office:value="26.5778319261653" calcext:value-type="float">
            <text:p>26,58</text:p>
          </table:table-cell>
          <table:table-cell table:formula="of:=MAX([.$C$1]-[.H17];0)" office:value-type="float" office:value="19.7688633412824" calcext:value-type="float">
            <text:p>19,77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MAX([.$C$1]-[.H18];0)" office:value-type="float" office:value="32.7705390101719" calcext:value-type="float">
            <text:p>32,77</text:p>
          </table:table-cell>
        </table:table-row>
        <table:table-row table:style-name="ro1">
          <table:table-cell table:number-columns-repeated="2"/>
          <table:table-cell table:style-name="ce8" table:number-columns-repeated="6"/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Call</text:p>
          </table:table-cell>
          <table:table-cell table:style-name="ce7" table:formula="of:=MAX(-[.$C$1]+[.C13];EXP(-[.D$10]*[.$C$3])*([.D$11]*[.D32]+(1-[.D$11])*[.D33]))" office:value-type="float" office:value="13.3526826935462" calcext:value-type="float">
            <text:p>13,352682693546</text:p>
          </table:table-cell>
          <table:table-cell table:style-name="ce6" table:formula="of:=MAX(-[.$C$1]+[.D13];EXP(-[.E$10]*[.$C$3])*([.E$11]*[.E32]+(1-[.E$11])*[.E33]))" office:value-type="float" office:value="19.8798466171958" calcext:value-type="float">
            <text:p>19,88</text:p>
          </table:table-cell>
          <table:table-cell table:style-name="ce6" table:formula="of:=MAX(-[.$C$1]+[.E13];EXP(-[.F$10]*[.$C$3])*([.F$11]*[.F32]+(1-[.F$11])*[.F33]))" office:value-type="float" office:value="28.5872525094356" calcext:value-type="float">
            <text:p>28,59</text:p>
          </table:table-cell>
          <table:table-cell table:style-name="ce6" table:formula="of:=MAX(-[.$C$1]+[.F13];EXP(-[.G$10]*[.$C$3])*([.G$11]*[.G32]+(1-[.G$11])*[.G33]))" office:value-type="float" office:value="39.431590772248" calcext:value-type="float">
            <text:p>39,43</text:p>
          </table:table-cell>
          <table:table-cell table:formula="of:=MAX(-[.$C$1]+[.G13];EXP(-[.H$10]*[.$C$3])*([.H$11]*[.H32]+(1-[.H$11])*[.H33]))" office:value-type="float" office:value="51.9084315929065" calcext:value-type="float">
            <text:p>51,91</text:p>
          </table:table-cell>
          <table:table-cell table:formula="of:=MAX(-[.$C$1]+[.H13];0)" office:value-type="float" office:value="65.6955908172592" calcext:value-type="float">
            <text:p>65,70</text:p>
          </table:table-cell>
        </table:table-row>
        <table:table-row table:style-name="ro1">
          <table:table-cell table:number-columns-repeated="3"/>
          <table:table-cell table:style-name="ce6" table:formula="of:=MAX(-[.$C$1]+[.D14];EXP(-[.E$10]*[.$C$3])*([.E$11]*[.E33]+(1-[.E$11])*[.E34]))" office:value-type="float" office:value="6.54475139515119" calcext:value-type="float">
            <text:p>6,54</text:p>
          </table:table-cell>
          <table:table-cell table:style-name="ce6" table:formula="of:=MAX(-[.$C$1]+[.E14];EXP(-[.F$10]*[.$C$3])*([.F$11]*[.F33]+(1-[.F$11])*[.F34]))" office:value-type="float" office:value="10.8323755656486" calcext:value-type="float">
            <text:p>10,83</text:p>
          </table:table-cell>
          <table:table-cell table:style-name="ce6" table:formula="of:=MAX(-[.$C$1]+[.F14];EXP(-[.G$10]*[.$C$3])*([.G$11]*[.G33]+(1-[.G$11])*[.G34]))" office:value-type="float" office:value="17.3832671835936" calcext:value-type="float">
            <text:p>17,38</text:p>
          </table:table-cell>
          <table:table-cell table:formula="of:=MAX(-[.$C$1]+[.G14];EXP(-[.H$10]*[.$C$3])*([.H$11]*[.H33]+(1-[.H$11])*[.H34]))" office:value-type="float" office:value="26.6500876227451" calcext:value-type="float">
            <text:p>26,65</text:p>
          </table:table-cell>
          <table:table-cell table:formula="of:=MAX(-[.$C$1]+[.H14];0)" office:value-type="float" office:value="37.9236861775001" calcext:value-type="float">
            <text:p>37,92</text:p>
          </table:table-cell>
        </table:table-row>
        <table:table-row table:style-name="ro1">
          <table:table-cell table:number-columns-repeated="4"/>
          <table:table-cell table:style-name="ce6" table:formula="of:=MAX(-[.$C$1]+[.E15];EXP(-[.F$10]*[.$C$3])*([.F$11]*[.F34]+(1-[.F$11])*[.F35]))" office:value-type="float" office:value="2.03554791921226" calcext:value-type="float">
            <text:p>2,04</text:p>
          </table:table-cell>
          <table:table-cell table:style-name="ce6" table:formula="of:=MAX(-[.$C$1]+[.F15];EXP(-[.G$10]*[.$C$3])*([.G$11]*[.G34]+(1-[.G$11])*[.G35]))" office:value-type="float" office:value="3.95683776442456" calcext:value-type="float">
            <text:p>3,96</text:p>
          </table:table-cell>
          <table:table-cell table:formula="of:=MAX(-[.$C$1]+[.G15];EXP(-[.H$10]*[.$C$3])*([.H$11]*[.H34]+(1-[.H$11])*[.H35]))" office:value-type="float" office:value="7.69157284198707" calcext:value-type="float">
            <text:p>7,69</text:p>
          </table:table-cell>
          <table:table-cell table:formula="of:=MAX(-[.$C$1]+[.H15];0)" office:value-type="float" office:value="14.9514072362268" calcext:value-type="float">
            <text:p>14,95</text:p>
          </table:table-cell>
        </table:table-row>
        <table:table-row table:style-name="ro1">
          <table:table-cell table:number-columns-repeated="5"/>
          <table:table-cell table:style-name="ce6" table:formula="of:=MAX(-[.$C$1]+[.F16];EXP(-[.G$10]*[.$C$3])*([.G$11]*[.G35]+(1-[.G$11])*[.G36]))" office:value-type="float" office:value="0" calcext:value-type="float">
            <text:p>0,00</text:p>
          </table:table-cell>
          <table:table-cell table:formula="of:=MAX(-[.$C$1]+[.G16];EXP(-[.H$10]*[.$C$3])*([.H$11]*[.H35]+(1-[.H$11])*[.H36]))" office:value-type="float" office:value="0" calcext:value-type="float">
            <text:p>0,00</text:p>
          </table:table-cell>
          <table:table-cell table:formula="of:=MAX(-[.$C$1]+[.H16];0)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  <table:table-cell table:formula="of:=MAX(-[.$C$1]+[.G17];EXP(-[.H$10]*[.$C$3])*([.H$11]*[.H36]+(1-[.H$11])*[.H37]))" office:value-type="float" office:value="0" calcext:value-type="float">
            <text:p>0,00</text:p>
          </table:table-cell>
          <table:table-cell table:formula="of:=MAX(-[.$C$1]+[.H17];0)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MAX(-[.$C$1]+[.H18];0)" office:value-type="float" office:value="0" calcext:value-type="float">
            <text:p>0,00</text:p>
          </table:table-cell>
        </table:table-row>
      </table:table>
      <table:table table:name="DIVIDEND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ce1" office:value-type="string" calcext:value-type="string">
            <text:p>K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Sigma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up</text:p>
          </table:table-cell>
          <table:table-cell table:style-name="ce3" table:formula="of:=EXP([.C2]*SQRT([.C3]))" office:value-type="float" office:value="1.09951407236227" calcext:value-type="float">
            <text:p>1,09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down</text:p>
          </table:table-cell>
          <table:table-cell table:style-name="ce3" table:formula="of:=1/[.C4]" office:value-type="float" office:value="0.909492679663058" calcext:value-type="float">
            <text:p>0,90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/>
          <table:table-cell table:number-columns-repeated="5" table:style-name="ce4" office:value-type="percentage" office:value="0.08" calcext:value-type="percentage">
            <text:p>8,00 %</text:p>
          </table:table-cell>
        </table:table-row>
        <table:table-row table:style-name="ro1">
          <table:table-cell/>
          <table:table-cell table:style-name="ce1" office:value-type="string" calcext:value-type="string">
            <text:p>r fwd</text:p>
          </table:table-cell>
          <table:table-cell table:style-name="ce4"/>
          <table:table-cell table:style-name="ce4" table:formula="of:=[.D9]" office:value-type="percentage" office:value="0.08" calcext:value-type="percentage">
            <text:p>8,00 %</text:p>
          </table:table-cell>
          <table:table-cell table:style-name="ce4" table:formula="of:=LN(EXP([.E8]*[.E9])/EXP([.D8]*[.D9]))/[.$C$3]" office:value-type="percentage" office:value="0.0800000000000005" calcext:value-type="percentage">
            <text:p>8,00 %</text:p>
          </table:table-cell>
          <table:table-cell table:style-name="ce4" table:formula="of:=LN(EXP([.F8]*[.F9])/EXP([.E8]*[.E9]))/[.$C$3]" office:value-type="percentage" office:value="0.0799999999999983" calcext:value-type="percentage">
            <text:p>8,00 %</text:p>
          </table:table-cell>
          <table:table-cell table:style-name="ce4" table:formula="of:=LN(EXP([.G8]*[.G9])/EXP([.F8]*[.F9]))/[.$C$3]" office:value-type="percentage" office:value="0.0799999999999983" calcext:value-type="percentage">
            <text:p>8,00 %</text:p>
          </table:table-cell>
          <table:table-cell table:style-name="ce4" table:formula="of:=LN(EXP([.H8]*[.H9])/EXP([.G8]*[.G9]))/[.$C$3]" office:value-type="percentage" office:value="0.0800000000000005" calcext:value-type="percentage">
            <text:p>8,00 %</text:p>
          </table:table-cell>
        </table:table-row>
        <table:table-row table:style-name="ro1">
          <table:table-cell/>
          <table:table-cell table:style-name="ce1" office:value-type="string" calcext:value-type="string">
            <text:p>q dividend yield</text:p>
          </table:table-cell>
          <table:table-cell table:style-name="ce4"/>
          <table:table-cell table:number-columns-repeated="5" table:style-name="ce4" office:value-type="percentage" office:value="0.05" calcext:value-type="percentage">
            <text:p>5,00 %</text:p>
          </table:table-cell>
        </table:table-row>
        <table:table-row table:style-name="ro1">
          <table:table-cell/>
          <table:table-cell table:style-name="ce1" office:value-type="string" calcext:value-type="string">
            <text:p>p</text:p>
          </table:table-cell>
          <table:table-cell table:style-name="ce3"/>
          <table:table-cell table:style-name="ce3" table:formula="of:=(EXP(([.D10]-[.D11])*[.$C$3])-[.$C$5])/([.$C$4]-[.$C$5])" office:value-type="float" office:value="0.492112090707291" calcext:value-type="float">
            <text:p>0,4921</text:p>
          </table:table-cell>
          <table:table-cell table:style-name="ce3" table:formula="of:=(EXP(([.E10]-[.E11])*[.$C$3])-[.$C$5])/([.$C$4]-[.$C$5])" office:value-type="float" office:value="0.492112090707291" calcext:value-type="float">
            <text:p>0,4921</text:p>
          </table:table-cell>
          <table:table-cell table:style-name="ce3" table:formula="of:=(EXP(([.F10]-[.F11])*[.$C$3])-[.$C$5])/([.$C$4]-[.$C$5])" office:value-type="float" office:value="0.492112090707289" calcext:value-type="float">
            <text:p>0,4921</text:p>
          </table:table-cell>
          <table:table-cell table:style-name="ce3" table:formula="of:=(EXP(([.G10]-[.G11])*[.$C$3])-[.$C$5])/([.$C$4]-[.$C$5])" office:value-type="float" office:value="0.492112090707289" calcext:value-type="float">
            <text:p>0,4921</text:p>
          </table:table-cell>
          <table:table-cell table:style-name="ce3" table:formula="of:=(EXP(([.H10]-[.H11])*[.$C$3])-[.$C$5])/([.$C$4]-[.$C$5])" office:value-type="float" office:value="0.492112090707291" calcext:value-type="float">
            <text:p>0,4921</text:p>
          </table:table-cell>
        </table:table-row>
        <table:table-row table:style-name="ro1"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6" office:value-type="float" office:value="100" calcext:value-type="float">
            <text:p>100,00</text:p>
          </table:table-cell>
          <table:table-cell table:style-name="ce6" table:formula="of:=[.C14]*[.C4]" office:value-type="float" office:value="109.951407236227" calcext:value-type="float">
            <text:p>109,95</text:p>
          </table:table-cell>
          <table:table-cell table:style-name="ce6" table:formula="of:=[.D14]*[.$C$4]" office:value-type="float" office:value="120.893119532266" calcext:value-type="float">
            <text:p>120,89</text:p>
          </table:table-cell>
          <table:table-cell table:style-name="ce6" table:formula="of:=[.E14]*[.$C$4]" office:value-type="float" office:value="132.9236861775" calcext:value-type="float">
            <text:p>132,92</text:p>
          </table:table-cell>
          <table:table-cell table:formula="of:=[.F14]*[.$C$4]" office:value-type="float" office:value="146.151463502427" calcext:value-type="float">
            <text:p>146,15</text:p>
          </table:table-cell>
          <table:table-cell table:formula="of:=[.G14]*[.$C$4]" office:value-type="float" office:value="160.695590817259" calcext:value-type="float">
            <text:p>160,70</text:p>
          </table:table-cell>
        </table:table-row>
        <table:table-row table:style-name="ro1">
          <table:table-cell table:number-columns-repeated="3"/>
          <table:table-cell table:style-name="ce6" table:formula="of:=[.C14]*[.$C$5]" office:value-type="float" office:value="90.9492679663057" calcext:value-type="float">
            <text:p>90,95</text:p>
          </table:table-cell>
          <table:table-cell table:style-name="ce6" table:formula="of:=[.D15]*[.$C$4]" office:value-type="float" office:value="100" calcext:value-type="float">
            <text:p>100,00</text:p>
          </table:table-cell>
          <table:table-cell table:style-name="ce6" table:formula="of:=[.E15]*[.$C$4]" office:value-type="float" office:value="109.951407236227" calcext:value-type="float">
            <text:p>109,95</text:p>
          </table:table-cell>
          <table:table-cell table:formula="of:=[.F15]*[.$C$4]" office:value-type="float" office:value="120.893119532266" calcext:value-type="float">
            <text:p>120,89</text:p>
          </table:table-cell>
          <table:table-cell table:formula="of:=[.G15]*[.$C$4]" office:value-type="float" office:value="132.9236861775" calcext:value-type="float">
            <text:p>132,92</text:p>
          </table:table-cell>
        </table:table-row>
        <table:table-row table:style-name="ro1">
          <table:table-cell table:number-columns-repeated="4"/>
          <table:table-cell table:style-name="ce6" table:formula="of:=[.D15]*[.$C$5]" office:value-type="float" office:value="82.7176934360689" calcext:value-type="float">
            <text:p>82,72</text:p>
          </table:table-cell>
          <table:table-cell table:style-name="ce6" table:formula="of:=[.E16]*[.$C$4]" office:value-type="float" office:value="90.9492679663058" calcext:value-type="float">
            <text:p>90,95</text:p>
          </table:table-cell>
          <table:table-cell table:formula="of:=[.F16]*[.$C$4]" office:value-type="float" office:value="100" calcext:value-type="float">
            <text:p>100,00</text:p>
          </table:table-cell>
          <table:table-cell table:formula="of:=[.G16]*[.$C$4]" office:value-type="float" office:value="109.951407236227" calcext:value-type="float">
            <text:p>109,95</text:p>
          </table:table-cell>
        </table:table-row>
        <table:table-row table:style-name="ro1">
          <table:table-cell table:number-columns-repeated="5"/>
          <table:table-cell table:style-name="ce6" table:formula="of:=[.E16]*[.$C$5]" office:value-type="float" office:value="75.2311366587176" calcext:value-type="float">
            <text:p>75,23</text:p>
          </table:table-cell>
          <table:table-cell table:formula="of:=[.F17]*[.$C$4]" office:value-type="float" office:value="82.7176934360689" calcext:value-type="float">
            <text:p>82,72</text:p>
          </table:table-cell>
          <table:table-cell table:formula="of:=[.G17]*[.$C$4]" office:value-type="float" office:value="90.9492679663058" calcext:value-type="float">
            <text:p>90,95</text:p>
          </table:table-cell>
        </table:table-row>
        <table:table-row table:style-name="ro1">
          <table:table-cell table:number-columns-repeated="6"/>
          <table:table-cell table:formula="of:=[.F17]*[.$C$5]" office:value-type="float" office:value="68.4221680738347" calcext:value-type="float">
            <text:p>68,42</text:p>
          </table:table-cell>
          <table:table-cell table:formula="of:=[.G18]*[.$C$4]" office:value-type="float" office:value="75.2311366587176" calcext:value-type="float">
            <text:p>75,23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[.G18]*[.$C$5]" office:value-type="float" office:value="62.2294609898281" calcext:value-type="float">
            <text:p>62,23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Put</text:p>
          </table:table-cell>
          <table:table-cell table:style-name="ce7" table:formula="of:=MAX([.$C$1]-[.C14];EXP(-[.D$10]*[.$C$3])*([.D$12]*[.D23]+(1-[.D$12])*[.D24]))" office:value-type="float" office:value="5.57013100800529" calcext:value-type="float">
            <text:p>5,570131008005</text:p>
          </table:table-cell>
          <table:table-cell table:style-name="ce6" table:formula="of:=MAX([.$C$1]-[.D14];EXP(-[.E$10]*[.$C$3])*([.E$12]*[.E23]+(1-[.E$12])*[.E24]))" office:value-type="float" office:value="2.32973916865885" calcext:value-type="float">
            <text:p>2,33</text:p>
          </table:table-cell>
          <table:table-cell table:style-name="ce6" table:formula="of:=MAX([.$C$1]-[.E14];EXP(-[.F$10]*[.$C$3])*([.F$12]*[.F23]+(1-[.F$12])*[.F24]))" office:value-type="float" office:value="0.518100569267452" calcext:value-type="float">
            <text:p>0,52</text:p>
          </table:table-cell>
          <table:table-cell table:style-name="ce6" table:formula="of:=MAX([.$C$1]-[.F14];EXP(-[.G$10]*[.$C$3])*([.G$12]*[.G23]+(1-[.G$12])*[.G24]))" office:value-type="float" office:value="0" calcext:value-type="float">
            <text:p>0,00</text:p>
          </table:table-cell>
          <table:table-cell table:formula="of:=MAX([.$C$1]-[.G14];EXP(-[.H$10]*[.$C$3])*([.H$12]*[.H23]+(1-[.H$12])*[.H24]))" office:value-type="float" office:value="0" calcext:value-type="float">
            <text:p>0,00</text:p>
          </table:table-cell>
          <table:table-cell table:formula="of:=MAX([.$C$1]-[.H14];0)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" table:formula="of:=MAX([.$C$1]-[.D15];EXP(-[.E$10]*[.$C$3])*([.E$12]*[.E24]+(1-[.E$12])*[.E25]))" office:value-type="float" office:value="8.79796089192778" calcext:value-type="float">
            <text:p>8,80</text:p>
          </table:table-cell>
          <table:table-cell table:style-name="ce6" table:formula="of:=MAX([.$C$1]-[.E15];EXP(-[.F$10]*[.$C$3])*([.F$12]*[.F24]+(1-[.F$12])*[.F25]))" office:value-type="float" office:value="4.12194943061501" calcext:value-type="float">
            <text:p>4,12</text:p>
          </table:table-cell>
          <table:table-cell table:style-name="ce6" table:formula="of:=MAX([.$C$1]-[.F15];EXP(-[.G$10]*[.$C$3])*([.G$12]*[.G24]+(1-[.G$12])*[.G25]))" office:value-type="float" office:value="1.02830169370822" calcext:value-type="float">
            <text:p>1,03</text:p>
          </table:table-cell>
          <table:table-cell table:formula="of:=MAX([.$C$1]-[.G15];EXP(-[.H$10]*[.$C$3])*([.H$12]*[.H24]+(1-[.H$12])*[.H25]))" office:value-type="float" office:value="0" calcext:value-type="float">
            <text:p>0,00</text:p>
          </table:table-cell>
          <table:table-cell table:formula="of:=MAX([.$C$1]-[.H15];0)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" table:formula="of:=MAX([.$C$1]-[.E16];EXP(-[.F$10]*[.$C$3])*([.F$12]*[.F25]+(1-[.F$12])*[.F26]))" office:value-type="float" office:value="13.4678648355914" calcext:value-type="float">
            <text:p>13,47</text:p>
          </table:table-cell>
          <table:table-cell table:style-name="ce6" table:formula="of:=MAX([.$C$1]-[.F16];EXP(-[.G$10]*[.$C$3])*([.G$12]*[.G25]+(1-[.G$12])*[.G26]))" office:value-type="float" office:value="7.18469079053104" calcext:value-type="float">
            <text:p>7,18</text:p>
          </table:table-cell>
          <table:table-cell table:formula="of:=MAX([.$C$1]-[.G16];EXP(-[.H$10]*[.$C$3])*([.H$12]*[.H25]+(1-[.H$12])*[.H26]))" office:value-type="float" office:value="2.04092494007152" calcext:value-type="float">
            <text:p>2,04</text:p>
          </table:table-cell>
          <table:table-cell table:formula="of:=MAX([.$C$1]-[.H16];0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6" table:formula="of:=MAX([.$C$1]-[.F17];EXP(-[.G$10]*[.$C$3])*([.G$12]*[.G26]+(1-[.G$12])*[.G27]))" office:value-type="float" office:value="19.7688633412824" calcext:value-type="float">
            <text:p>19,77</text:p>
          </table:table-cell>
          <table:table-cell table:formula="of:=MAX([.$C$1]-[.G17];EXP(-[.H$10]*[.$C$3])*([.H$12]*[.H26]+(1-[.H$12])*[.H27]))" office:value-type="float" office:value="12.2823065639311" calcext:value-type="float">
            <text:p>12,28</text:p>
          </table:table-cell>
          <table:table-cell table:formula="of:=MAX([.$C$1]-[.H17];0)" office:value-type="float" office:value="4.05073203369425" calcext:value-type="float">
            <text:p>4,05</text:p>
          </table:table-cell>
        </table:table-row>
        <table:table-row table:style-name="ro1">
          <table:table-cell table:number-columns-repeated="6"/>
          <table:table-cell table:formula="of:=MAX([.$C$1]-[.G18];EXP(-[.H$10]*[.$C$3])*([.H$12]*[.H27]+(1-[.H$12])*[.H28]))" office:value-type="float" office:value="26.5778319261653" calcext:value-type="float">
            <text:p>26,58</text:p>
          </table:table-cell>
          <table:table-cell table:formula="of:=MAX([.$C$1]-[.H18];0)" office:value-type="float" office:value="19.7688633412824" calcext:value-type="float">
            <text:p>19,77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MAX([.$C$1]-[.H19];0)" office:value-type="float" office:value="32.7705390101719" calcext:value-type="float">
            <text:p>32,77</text:p>
          </table:table-cell>
        </table:table-row>
        <table:table-row table:style-name="ro1">
          <table:table-cell table:number-columns-repeated="2"/>
          <table:table-cell table:style-name="ce8" table:number-columns-repeated="6"/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Call</text:p>
          </table:table-cell>
          <table:table-cell table:style-name="ce7" table:formula="of:=MAX(-[.$C$1]+[.C14];EXP(-[.D$10]*[.$C$3])*([.D$12]*[.D33]+(1-[.D$12])*[.D34]))" office:value-type="float" office:value="11.6644870528769" calcext:value-type="float">
            <text:p>11,664487052877</text:p>
          </table:table-cell>
          <table:table-cell table:style-name="ce6" table:formula="of:=MAX(-[.$C$1]+[.D14];EXP(-[.E$10]*[.$C$3])*([.E$12]*[.E33]+(1-[.E$12])*[.E34]))" office:value-type="float" office:value="18.0517860783188" calcext:value-type="float">
            <text:p>18,05</text:p>
          </table:table-cell>
          <table:table-cell table:style-name="ce6" table:formula="of:=MAX(-[.$C$1]+[.E14];EXP(-[.F$10]*[.$C$3])*([.F$12]*[.F33]+(1-[.F$12])*[.F34]))" office:value-type="float" office:value="26.8642136093614" calcext:value-type="float">
            <text:p>26,86</text:p>
          </table:table-cell>
          <table:table-cell table:style-name="ce6" table:formula="of:=MAX(-[.$C$1]+[.F14];EXP(-[.G$10]*[.$C$3])*([.G$12]*[.G33]+(1-[.G$12])*[.G34]))" office:value-type="float" office:value="38.1089779961085" calcext:value-type="float">
            <text:p>38,11</text:p>
          </table:table-cell>
          <table:table-cell table:formula="of:=MAX(-[.$C$1]+[.G14];EXP(-[.H$10]*[.$C$3])*([.H$12]*[.H33]+(1-[.H$12])*[.H34]))" office:value-type="float" office:value="51.1794981276682" calcext:value-type="float">
            <text:p>51,18</text:p>
          </table:table-cell>
          <table:table-cell table:formula="of:=MAX(-[.$C$1]+[.H14];0)" office:value-type="float" office:value="65.6955908172592" calcext:value-type="float">
            <text:p>65,70</text:p>
          </table:table-cell>
        </table:table-row>
        <table:table-row table:style-name="ro1">
          <table:table-cell table:number-columns-repeated="3"/>
          <table:table-cell table:style-name="ce6" table:formula="of:=MAX(-[.$C$1]+[.D15];EXP(-[.E$10]*[.$C$3])*([.E$12]*[.E34]+(1-[.E$12])*[.E35]))" office:value-type="float" office:value="5.66005799636015" calcext:value-type="float">
            <text:p>5,66</text:p>
          </table:table-cell>
          <table:table-cell table:style-name="ce6" table:formula="of:=MAX(-[.$C$1]+[.E15];EXP(-[.F$10]*[.$C$3])*([.F$12]*[.F34]+(1-[.F$12])*[.F35]))" office:value-type="float" office:value="9.79857002310815" calcext:value-type="float">
            <text:p>9,80</text:p>
          </table:table-cell>
          <table:table-cell table:style-name="ce6" table:formula="of:=MAX(-[.$C$1]+[.F15];EXP(-[.G$10]*[.$C$3])*([.G$12]*[.G34]+(1-[.G$12])*[.G35]))" office:value-type="float" office:value="16.3935787431696" calcext:value-type="float">
            <text:p>16,39</text:p>
          </table:table-cell>
          <table:table-cell table:formula="of:=MAX(-[.$C$1]+[.G15];EXP(-[.H$10]*[.$C$3])*([.H$12]*[.H34]+(1-[.H$12])*[.H35]))" office:value-type="float" office:value="26.0471306736164" calcext:value-type="float">
            <text:p>26,05</text:p>
          </table:table-cell>
          <table:table-cell table:formula="of:=MAX(-[.$C$1]+[.H15];0)" office:value-type="float" office:value="37.9236861775001" calcext:value-type="float">
            <text:p>37,92</text:p>
          </table:table-cell>
        </table:table-row>
        <table:table-row table:style-name="ro1">
          <table:table-cell table:number-columns-repeated="4"/>
          <table:table-cell table:style-name="ce6" table:formula="of:=MAX(-[.$C$1]+[.E16];EXP(-[.F$10]*[.$C$3])*([.F$12]*[.F35]+(1-[.F$12])*[.F36]))" office:value-type="float" office:value="1.73960685018656" calcext:value-type="float">
            <text:p>1,74</text:p>
          </table:table-cell>
          <table:table-cell table:style-name="ce6" table:formula="of:=MAX(-[.$C$1]+[.F16];EXP(-[.G$10]*[.$C$3])*([.G$12]*[.G35]+(1-[.G$12])*[.G36]))" office:value-type="float" office:value="3.56337418702869" calcext:value-type="float">
            <text:p>3,56</text:p>
          </table:table-cell>
          <table:table-cell table:formula="of:=MAX(-[.$C$1]+[.G16];EXP(-[.H$10]*[.$C$3])*([.H$12]*[.H35]+(1-[.H$12])*[.H36]))" office:value-type="float" office:value="7.29914094981901" calcext:value-type="float">
            <text:p>7,30</text:p>
          </table:table-cell>
          <table:table-cell table:formula="of:=MAX(-[.$C$1]+[.H16];0)" office:value-type="float" office:value="14.9514072362268" calcext:value-type="float">
            <text:p>14,95</text:p>
          </table:table-cell>
        </table:table-row>
        <table:table-row table:style-name="ro1">
          <table:table-cell table:number-columns-repeated="5"/>
          <table:table-cell table:style-name="ce6" table:formula="of:=MAX(-[.$C$1]+[.F17];EXP(-[.G$10]*[.$C$3])*([.G$12]*[.G36]+(1-[.G$12])*[.G37]))" office:value-type="float" office:value="0" calcext:value-type="float">
            <text:p>0,00</text:p>
          </table:table-cell>
          <table:table-cell table:formula="of:=MAX(-[.$C$1]+[.G17];EXP(-[.H$10]*[.$C$3])*([.H$12]*[.H36]+(1-[.H$12])*[.H37]))" office:value-type="float" office:value="0" calcext:value-type="float">
            <text:p>0,00</text:p>
          </table:table-cell>
          <table:table-cell table:formula="of:=MAX(-[.$C$1]+[.H17];0)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  <table:table-cell table:formula="of:=MAX(-[.$C$1]+[.G18];EXP(-[.H$10]*[.$C$3])*([.H$12]*[.H37]+(1-[.H$12])*[.H38]))" office:value-type="float" office:value="0" calcext:value-type="float">
            <text:p>0,00</text:p>
          </table:table-cell>
          <table:table-cell table:formula="of:=MAX(-[.$C$1]+[.H18];0)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MAX(-[.$C$1]+[.H19];0)" office:value-type="float" office:value="0" calcext:value-type="float">
            <text:p>0,00</text:p>
          </table:table-cell>
        </table:table-row>
      </table:table>
      <table:table table:name="NONCON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ce1" office:value-type="string" calcext:value-type="string">
            <text:p>K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Sigma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up</text:p>
          </table:table-cell>
          <table:table-cell table:style-name="ce3" table:formula="of:=EXP([.C2]*SQRT([.C3]))" office:value-type="float" office:value="1.09951407236227" calcext:value-type="float">
            <text:p>1,09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down</text:p>
          </table:table-cell>
          <table:table-cell table:style-name="ce3" table:formula="of:=1/[.C4]" office:value-type="float" office:value="0.909492679663058" calcext:value-type="float">
            <text:p>0,90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/>
          <table:table-cell table:number-columns-repeated="2" table:style-name="ce4" office:value-type="percentage" office:value="0.03" calcext:value-type="percentage">
            <text:p>3,00 %</text:p>
          </table:table-cell>
          <table:table-cell table:number-columns-repeated="3" table:style-name="ce4" office:value-type="percentage" office:value="0.06" calcext:value-type="percentage">
            <text:p>6,00 %</text:p>
          </table:table-cell>
        </table:table-row>
        <table:table-row table:style-name="ro1">
          <table:table-cell/>
          <table:table-cell table:style-name="ce1" office:value-type="string" calcext:value-type="string">
            <text:p>r fwd</text:p>
          </table:table-cell>
          <table:table-cell table:style-name="ce4"/>
          <table:table-cell table:style-name="ce4" table:formula="of:=[.D9]" office:value-type="percentage" office:value="0.03" calcext:value-type="percentage">
            <text:p>3,00 %</text:p>
          </table:table-cell>
          <table:table-cell table:style-name="ce4" table:formula="of:=LN(EXP([.E8]*[.E9])/EXP([.D8]*[.D9]))/[.$C$3]" office:value-type="percentage" office:value="0.0300000000000006" calcext:value-type="percentage">
            <text:p>3,00 %</text:p>
          </table:table-cell>
          <table:table-cell table:style-name="ce4" table:formula="of:=LN(EXP([.F8]*[.F9])/EXP([.E8]*[.E9]))/[.$C$3]" office:value-type="percentage" office:value="0.119999999999998" calcext:value-type="percentage">
            <text:p>12,00 %</text:p>
          </table:table-cell>
          <table:table-cell table:style-name="ce4" table:formula="of:=LN(EXP([.G8]*[.G9])/EXP([.F8]*[.F9]))/[.$C$3]" office:value-type="percentage" office:value="0.0600000000000006" calcext:value-type="percentage">
            <text:p>6,00 %</text:p>
          </table:table-cell>
          <table:table-cell table:style-name="ce4" table:formula="of:=LN(EXP([.H8]*[.H9])/EXP([.G8]*[.G9]))/[.$C$3]" office:value-type="percentage" office:value="0.0600000000000006" calcext:value-type="percentage">
            <text:p>6,00 %</text:p>
          </table:table-cell>
        </table:table-row>
        <table:table-row table:style-name="ro1">
          <table:table-cell/>
          <table:table-cell table:style-name="ce1" office:value-type="string" calcext:value-type="string">
            <text:p>p</text:p>
          </table:table-cell>
          <table:table-cell table:style-name="ce3"/>
          <table:table-cell table:style-name="ce3" table:formula="of:=(EXP([.D10]*[.$C$3])-[.$C$5])/([.$C$4]-[.$C$5])" office:value-type="float" office:value="0.492112090707291" calcext:value-type="float">
            <text:p>0,4921</text:p>
          </table:table-cell>
          <table:table-cell table:style-name="ce3" table:formula="of:=(EXP([.E10]*[.$C$3])-[.$C$5])/([.$C$4]-[.$C$5])" office:value-type="float" office:value="0.492112090707291" calcext:value-type="float">
            <text:p>0,4921</text:p>
          </table:table-cell>
          <table:table-cell table:style-name="ce3" table:formula="of:=(EXP([.F10]*[.$C$3])-[.$C$5])/([.$C$4]-[.$C$5])" office:value-type="float" office:value="0.539831898639938" calcext:value-type="float">
            <text:p>0,5398</text:p>
          </table:table-cell>
          <table:table-cell table:style-name="ce3" table:formula="of:=(EXP([.G10]*[.$C$3])-[.$C$5])/([.$C$4]-[.$C$5])" office:value-type="float" office:value="0.507970997475004" calcext:value-type="float">
            <text:p>0,5080</text:p>
          </table:table-cell>
          <table:table-cell table:style-name="ce3" table:formula="of:=(EXP([.H10]*[.$C$3])-[.$C$5])/([.$C$4]-[.$C$5])" office:value-type="float" office:value="0.507970997475004" calcext:value-type="float">
            <text:p>0,5080</text:p>
          </table:table-cell>
        </table:table-row>
        <table:table-row table:style-name="ro1"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6" office:value-type="float" office:value="100" calcext:value-type="float">
            <text:p>100,00</text:p>
          </table:table-cell>
          <table:table-cell table:style-name="ce6" table:formula="of:=[.C13]*[.C4]" office:value-type="float" office:value="109.951407236227" calcext:value-type="float">
            <text:p>109,95</text:p>
          </table:table-cell>
          <table:table-cell table:style-name="ce6" table:formula="of:=[.D13]*[.$C$4]" office:value-type="float" office:value="120.893119532266" calcext:value-type="float">
            <text:p>120,89</text:p>
          </table:table-cell>
          <table:table-cell table:style-name="ce6" table:formula="of:=[.E13]*[.$C$4]" office:value-type="float" office:value="132.9236861775" calcext:value-type="float">
            <text:p>132,92</text:p>
          </table:table-cell>
          <table:table-cell table:formula="of:=[.F13]*[.$C$4]" office:value-type="float" office:value="146.151463502427" calcext:value-type="float">
            <text:p>146,15</text:p>
          </table:table-cell>
          <table:table-cell table:formula="of:=[.G13]*[.$C$4]" office:value-type="float" office:value="160.695590817259" calcext:value-type="float">
            <text:p>160,70</text:p>
          </table:table-cell>
        </table:table-row>
        <table:table-row table:style-name="ro1">
          <table:table-cell table:number-columns-repeated="3"/>
          <table:table-cell table:style-name="ce6" table:formula="of:=[.C13]*[.$C$5]" office:value-type="float" office:value="90.9492679663057" calcext:value-type="float">
            <text:p>90,95</text:p>
          </table:table-cell>
          <table:table-cell table:style-name="ce6" table:formula="of:=[.D14]*[.$C$4]" office:value-type="float" office:value="100" calcext:value-type="float">
            <text:p>100,00</text:p>
          </table:table-cell>
          <table:table-cell table:style-name="ce6" table:formula="of:=[.E14]*[.$C$4]" office:value-type="float" office:value="109.951407236227" calcext:value-type="float">
            <text:p>109,95</text:p>
          </table:table-cell>
          <table:table-cell table:formula="of:=[.F14]*[.$C$4]" office:value-type="float" office:value="120.893119532266" calcext:value-type="float">
            <text:p>120,89</text:p>
          </table:table-cell>
          <table:table-cell table:formula="of:=[.G14]*[.$C$4]" office:value-type="float" office:value="132.9236861775" calcext:value-type="float">
            <text:p>132,92</text:p>
          </table:table-cell>
        </table:table-row>
        <table:table-row table:style-name="ro1">
          <table:table-cell table:number-columns-repeated="4"/>
          <table:table-cell table:style-name="ce6" table:formula="of:=[.D14]*[.$C$5]" office:value-type="float" office:value="82.7176934360689" calcext:value-type="float">
            <text:p>82,72</text:p>
          </table:table-cell>
          <table:table-cell table:style-name="ce6" table:formula="of:=[.E15]*[.$C$4]" office:value-type="float" office:value="90.9492679663058" calcext:value-type="float">
            <text:p>90,95</text:p>
          </table:table-cell>
          <table:table-cell table:formula="of:=[.F15]*[.$C$4]" office:value-type="float" office:value="100" calcext:value-type="float">
            <text:p>100,00</text:p>
          </table:table-cell>
          <table:table-cell table:formula="of:=[.G15]*[.$C$4]" office:value-type="float" office:value="109.951407236227" calcext:value-type="float">
            <text:p>109,95</text:p>
          </table:table-cell>
        </table:table-row>
        <table:table-row table:style-name="ro1">
          <table:table-cell table:number-columns-repeated="5"/>
          <table:table-cell table:style-name="ce6" table:formula="of:=[.E15]*[.$C$5]" office:value-type="float" office:value="75.2311366587176" calcext:value-type="float">
            <text:p>75,23</text:p>
          </table:table-cell>
          <table:table-cell table:formula="of:=[.F16]*[.$C$4]" office:value-type="float" office:value="82.7176934360689" calcext:value-type="float">
            <text:p>82,72</text:p>
          </table:table-cell>
          <table:table-cell table:formula="of:=[.G16]*[.$C$4]" office:value-type="float" office:value="90.9492679663058" calcext:value-type="float">
            <text:p>90,95</text:p>
          </table:table-cell>
        </table:table-row>
        <table:table-row table:style-name="ro1">
          <table:table-cell table:number-columns-repeated="6"/>
          <table:table-cell table:formula="of:=[.F16]*[.$C$5]" office:value-type="float" office:value="68.4221680738347" calcext:value-type="float">
            <text:p>68,42</text:p>
          </table:table-cell>
          <table:table-cell table:formula="of:=[.G17]*[.$C$4]" office:value-type="float" office:value="75.2311366587176" calcext:value-type="float">
            <text:p>75,23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[.G17]*[.$C$5]" office:value-type="float" office:value="62.2294609898281" calcext:value-type="float">
            <text:p>62,23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Put</text:p>
          </table:table-cell>
          <table:table-cell table:style-name="ce7" table:formula="of:=MAX([.$C$1]-[.C13];EXP(-[.D$10]*[.$C$3])*([.D$11]*[.D22]+(1-[.D$11])*[.D23]))" office:value-type="float" office:value="5.20909830638168" calcext:value-type="float">
            <text:p>5,209098306382</text:p>
          </table:table-cell>
          <table:table-cell table:style-name="ce6" table:formula="of:=MAX([.$C$1]-[.D13];EXP(-[.E$10]*[.$C$3])*([.E$11]*[.E22]+(1-[.E$11])*[.E23]))" office:value-type="float" office:value="2.09121908986675" calcext:value-type="float">
            <text:p>2,09</text:p>
          </table:table-cell>
          <table:table-cell table:style-name="ce6" table:formula="of:=MAX([.$C$1]-[.E13];EXP(-[.F$10]*[.$C$3])*([.F$11]*[.F22]+(1-[.F$11])*[.F23]))" office:value-type="float" office:value="0.440563347099619" calcext:value-type="float">
            <text:p>0,44</text:p>
          </table:table-cell>
          <table:table-cell table:style-name="ce6" table:formula="of:=MAX([.$C$1]-[.F13];EXP(-[.G$10]*[.$C$3])*([.G$11]*[.G22]+(1-[.G$11])*[.G23]))" office:value-type="float" office:value="0" calcext:value-type="float">
            <text:p>0,00</text:p>
          </table:table-cell>
          <table:table-cell table:formula="of:=MAX([.$C$1]-[.G13];EXP(-[.H$10]*[.$C$3])*([.H$11]*[.H22]+(1-[.H$11])*[.H23]))" office:value-type="float" office:value="0" calcext:value-type="float">
            <text:p>0,00</text:p>
          </table:table-cell>
          <table:table-cell table:formula="of:=MAX([.$C$1]-[.H13];0)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" table:formula="of:=MAX([.$C$1]-[.D14];EXP(-[.E$10]*[.$C$3])*([.E$11]*[.E23]+(1-[.E$11])*[.E24]))" office:value-type="float" office:value="8.26094654055323" calcext:value-type="float">
            <text:p>8,26</text:p>
          </table:table-cell>
          <table:table-cell table:style-name="ce6" table:formula="of:=MAX([.$C$1]-[.E14];EXP(-[.F$10]*[.$C$3])*([.F$11]*[.F23]+(1-[.F$11])*[.F24]))" office:value-type="float" office:value="3.70297379165549" calcext:value-type="float">
            <text:p>3,70</text:p>
          </table:table-cell>
          <table:table-cell table:style-name="ce6" table:formula="of:=MAX([.$C$1]-[.F14];EXP(-[.G$10]*[.$C$3])*([.G$11]*[.G23]+(1-[.G$11])*[.G24]))" office:value-type="float" office:value="0.968954505476963" calcext:value-type="float">
            <text:p>0,97</text:p>
          </table:table-cell>
          <table:table-cell table:formula="of:=MAX([.$C$1]-[.G14];EXP(-[.H$10]*[.$C$3])*([.H$11]*[.H23]+(1-[.H$11])*[.H24]))" office:value-type="float" office:value="0" calcext:value-type="float">
            <text:p>0,00</text:p>
          </table:table-cell>
          <table:table-cell table:formula="of:=MAX([.$C$1]-[.H14];0)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" table:formula="of:=MAX([.$C$1]-[.E15];EXP(-[.F$10]*[.$C$3])*([.F$11]*[.F24]+(1-[.F$11])*[.F25]))" office:value-type="float" office:value="12.7262104470881" calcext:value-type="float">
            <text:p>12,73</text:p>
          </table:table-cell>
          <table:table-cell table:style-name="ce6" table:formula="of:=MAX([.$C$1]-[.F15];EXP(-[.G$10]*[.$C$3])*([.G$11]*[.G24]+(1-[.G$11])*[.G25]))" office:value-type="float" office:value="7.00744923651586" calcext:value-type="float">
            <text:p>7,01</text:p>
          </table:table-cell>
          <table:table-cell table:formula="of:=MAX([.$C$1]-[.G15];EXP(-[.H$10]*[.$C$3])*([.H$11]*[.H24]+(1-[.H$11])*[.H25]))" office:value-type="float" office:value="1.98115497993668" calcext:value-type="float">
            <text:p>1,98</text:p>
          </table:table-cell>
          <table:table-cell table:formula="of:=MAX([.$C$1]-[.H15];0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6" table:formula="of:=MAX([.$C$1]-[.F16];EXP(-[.G$10]*[.$C$3])*([.G$11]*[.G25]+(1-[.G$11])*[.G26]))" office:value-type="float" office:value="19.7688633412824" calcext:value-type="float">
            <text:p>19,77</text:p>
          </table:table-cell>
          <table:table-cell table:formula="of:=MAX([.$C$1]-[.G16];EXP(-[.H$10]*[.$C$3])*([.H$11]*[.H25]+(1-[.H$11])*[.H26]))" office:value-type="float" office:value="12.2823065639311" calcext:value-type="float">
            <text:p>12,28</text:p>
          </table:table-cell>
          <table:table-cell table:formula="of:=MAX([.$C$1]-[.H16];0)" office:value-type="float" office:value="4.05073203369425" calcext:value-type="float">
            <text:p>4,05</text:p>
          </table:table-cell>
        </table:table-row>
        <table:table-row table:style-name="ro1">
          <table:table-cell table:number-columns-repeated="6"/>
          <table:table-cell table:formula="of:=MAX([.$C$1]-[.G17];EXP(-[.H$10]*[.$C$3])*([.H$11]*[.H26]+(1-[.H$11])*[.H27]))" office:value-type="float" office:value="26.5778319261653" calcext:value-type="float">
            <text:p>26,58</text:p>
          </table:table-cell>
          <table:table-cell table:formula="of:=MAX([.$C$1]-[.H17];0)" office:value-type="float" office:value="19.7688633412824" calcext:value-type="float">
            <text:p>19,77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MAX([.$C$1]-[.H18];0)" office:value-type="float" office:value="32.7705390101719" calcext:value-type="float">
            <text:p>32,77</text:p>
          </table:table-cell>
        </table:table-row>
        <table:table-row table:style-name="ro1">
          <table:table-cell table:number-columns-repeated="2"/>
          <table:table-cell table:style-name="ce8" table:number-columns-repeated="6"/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Call</text:p>
          </table:table-cell>
          <table:table-cell table:style-name="ce7" table:formula="of:=MAX(-[.$C$1]+[.C13];EXP(-[.D$10]*[.$C$3])*([.D$11]*[.D32]+(1-[.D$11])*[.D33]))" office:value-type="float" office:value="12.7838550420146" calcext:value-type="float">
            <text:p>12,783855042015</text:p>
          </table:table-cell>
          <table:table-cell table:style-name="ce6" table:formula="of:=MAX(-[.$C$1]+[.D13];EXP(-[.E$10]*[.$C$3])*([.E$11]*[.E32]+(1-[.E$11])*[.E33]))" office:value-type="float" office:value="19.5093161096982" calcext:value-type="float">
            <text:p>19,51</text:p>
          </table:table-cell>
          <table:table-cell table:style-name="ce6" table:formula="of:=MAX(-[.$C$1]+[.E13];EXP(-[.F$10]*[.$C$3])*([.F$11]*[.F32]+(1-[.F$11])*[.F33]))" office:value-type="float" office:value="28.5865404523641" calcext:value-type="float">
            <text:p>28,59</text:p>
          </table:table-cell>
          <table:table-cell table:style-name="ce6" table:formula="of:=MAX(-[.$C$1]+[.F13];EXP(-[.G$10]*[.$C$3])*([.G$11]*[.G32]+(1-[.G$11])*[.G33]))" office:value-type="float" office:value="39.0568734556167" calcext:value-type="float">
            <text:p>39,06</text:p>
          </table:table-cell>
          <table:table-cell table:formula="of:=MAX(-[.$C$1]+[.G13];EXP(-[.H$10]*[.$C$3])*([.H$11]*[.H32]+(1-[.H$11])*[.H33]))" office:value-type="float" office:value="51.7197569173034" calcext:value-type="float">
            <text:p>51,72</text:p>
          </table:table-cell>
          <table:table-cell table:formula="of:=MAX(-[.$C$1]+[.H13];0)" office:value-type="float" office:value="65.6955908172592" calcext:value-type="float">
            <text:p>65,70</text:p>
          </table:table-cell>
        </table:table-row>
        <table:table-row table:style-name="ro1">
          <table:table-cell table:number-columns-repeated="3"/>
          <table:table-cell table:style-name="ce6" table:formula="of:=MAX(-[.$C$1]+[.D14];EXP(-[.E$10]*[.$C$3])*([.E$11]*[.E33]+(1-[.E$11])*[.E34]))" office:value-type="float" office:value="6.34292290504046" calcext:value-type="float">
            <text:p>6,34</text:p>
          </table:table-cell>
          <table:table-cell table:style-name="ce6" table:formula="of:=MAX(-[.$C$1]+[.E14];EXP(-[.F$10]*[.$C$3])*([.F$11]*[.F33]+(1-[.F$11])*[.F34]))" office:value-type="float" office:value="10.8294559667029" calcext:value-type="float">
            <text:p>10,83</text:p>
          </table:table-cell>
          <table:table-cell table:style-name="ce6" table:formula="of:=MAX(-[.$C$1]+[.F14];EXP(-[.G$10]*[.$C$3])*([.G$11]*[.G33]+(1-[.G$11])*[.G34]))" office:value-type="float" office:value="17.0535490198204" calcext:value-type="float">
            <text:p>17,05</text:p>
          </table:table-cell>
          <table:table-cell table:formula="of:=MAX(-[.$C$1]+[.G14];EXP(-[.H$10]*[.$C$3])*([.H$11]*[.H33]+(1-[.H$11])*[.H34]))" office:value-type="float" office:value="26.461412947142" calcext:value-type="float">
            <text:p>26,46</text:p>
          </table:table-cell>
          <table:table-cell table:formula="of:=MAX(-[.$C$1]+[.H14];0)" office:value-type="float" office:value="37.9236861775001" calcext:value-type="float">
            <text:p>37,92</text:p>
          </table:table-cell>
        </table:table-row>
        <table:table-row table:style-name="ro1">
          <table:table-cell table:number-columns-repeated="4"/>
          <table:table-cell table:style-name="ce6" table:formula="of:=MAX(-[.$C$1]+[.E15];EXP(-[.F$10]*[.$C$3])*([.F$11]*[.F34]+(1-[.F$11])*[.F35]))" office:value-type="float" office:value="2.03327153409623" calcext:value-type="float">
            <text:p>2,03</text:p>
          </table:table-cell>
          <table:table-cell table:style-name="ce6" table:formula="of:=MAX(-[.$C$1]+[.F15];EXP(-[.G$10]*[.$C$3])*([.G$11]*[.G34]+(1-[.G$11])*[.G35]))" office:value-type="float" office:value="3.81196031687553" calcext:value-type="float">
            <text:p>3,81</text:p>
          </table:table-cell>
          <table:table-cell table:formula="of:=MAX(-[.$C$1]+[.G15];EXP(-[.H$10]*[.$C$3])*([.H$11]*[.H34]+(1-[.H$11])*[.H35]))" office:value-type="float" office:value="7.54944839481285" calcext:value-type="float">
            <text:p>7,55</text:p>
          </table:table-cell>
          <table:table-cell table:formula="of:=MAX(-[.$C$1]+[.H15];0)" office:value-type="float" office:value="14.9514072362268" calcext:value-type="float">
            <text:p>14,95</text:p>
          </table:table-cell>
        </table:table-row>
        <table:table-row table:style-name="ro1">
          <table:table-cell table:number-columns-repeated="5"/>
          <table:table-cell table:style-name="ce6" table:formula="of:=MAX(-[.$C$1]+[.F16];EXP(-[.G$10]*[.$C$3])*([.G$11]*[.G35]+(1-[.G$11])*[.G36]))" office:value-type="float" office:value="0" calcext:value-type="float">
            <text:p>0,00</text:p>
          </table:table-cell>
          <table:table-cell table:formula="of:=MAX(-[.$C$1]+[.G16];EXP(-[.H$10]*[.$C$3])*([.H$11]*[.H35]+(1-[.H$11])*[.H36]))" office:value-type="float" office:value="0" calcext:value-type="float">
            <text:p>0,00</text:p>
          </table:table-cell>
          <table:table-cell table:formula="of:=MAX(-[.$C$1]+[.H16];0)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  <table:table-cell table:formula="of:=MAX(-[.$C$1]+[.G17];EXP(-[.H$10]*[.$C$3])*([.H$11]*[.H36]+(1-[.H$11])*[.H37]))" office:value-type="float" office:value="0" calcext:value-type="float">
            <text:p>0,00</text:p>
          </table:table-cell>
          <table:table-cell table:formula="of:=MAX(-[.$C$1]+[.H17];0)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MAX(-[.$C$1]+[.H18];0)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de" fo:country="D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0T17:45:38.613816239</meta:creation-date>
    <dc:date>2026-05-10T19:41:25.764877175</dc:date>
    <meta:editing-duration>PT1H55M46S</meta:editing-duration>
    <meta:editing-cycles>3</meta:editing-cycles>
    <meta:generator>LibreOffice/7.4.7.2$Linux_X86_64 LibreOffice_project/40$Build-2</meta:generator>
    <meta:document-statistic meta:table-count="3" meta:cell-count="330" meta:object-count="0"/>
  </office:meta>
</office:document-meta>
</file>